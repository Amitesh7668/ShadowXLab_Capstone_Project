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F000000812DC2150D.png"/>
  <manifest:file-entry manifest:media-type="image/png" manifest:full-path="Pictures/1000000000000319000001C36C7FB6E6.png"/>
  <manifest:file-entry manifest:media-type="image/png" manifest:full-path="Pictures/10000000000004F3000001EC3C25318B.png"/>
  <manifest:file-entry manifest:media-type="image/png" manifest:full-path="Pictures/100000000000031A0000005FDF3866E8.png"/>
  <manifest:file-entry manifest:media-type="image/png" manifest:full-path="Pictures/10000000000003240000019A37EDED88.png"/>
  <manifest:file-entry manifest:media-type="image/png" manifest:full-path="Pictures/10000000000001680000015D7465AB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6cm" fo:margin-bottom="0.212cm"/>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8pt" fo:font-weight="bold" style:font-size-asian="18pt" style:font-weight-asian="bold"/>
    </style:style>
    <style:style style:name="T2" style:family="text">
      <style:text-properties fo:font-size="12pt" fo:font-weight="bold" style:font-size-asian="12pt" style:font-weight-asian="bold"/>
    </style:style>
    <style:style style:name="T3" style:family="text">
      <style:text-properties style:font-name="Consolas" fo:font-size="8.5pt" style:font-size-asian="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hadowXLab Docker &amp; Kubernetes Capstone Project</text:span></text:p>
      <text:p text:style-name="P1"><text:span text:style-name="T2">Build → Push → Deploy → Scale → Expose → Update → Recover</text:span></text:p>
      <text:list xml:id="list3463910957135240245" text:style-name="Outline">
        <text:list-item>
          <text:p text:style-name="Heading_20_1">1. Project Overview</text:p>
        </text:list-item>
      </text:list>
      <text:p text:style-name="Standard">This capstone project demonstrates the complete container lifecycle for the ShadowXLab Cyber Learning Portal. The application is developed using Python Flask, containerized with Docker, published to Docker Hub, deployed on Kubernetes, exposed using a Kubernetes Service, scaled using replicas, updated through a rolling update, and restored using rollback.</text:p>
      <text:list xml:id="list43579488" text:continue-numbering="true" text:style-name="Outline">
        <text:list-item>
          <text:p text:style-name="Heading_20_1">2. Business Scenario</text:p>
        </text:list-item>
      </text:list>
      <text:p text:style-name="Standard">ShadowXLab is launching a Cyber Learning Portal that must be containerized and deployed on Kubernetes with high availability and scalability. The solution uses Docker for image creation and Kubernetes for deployment, service exposure, scaling, updates, rollback, recovery, and monitoring.</text:p>
      <text:list xml:id="list43560857" text:continue-numbering="true" text:style-name="Outline">
        <text:list-item>
          <text:p text:style-name="Heading_20_1">3. Project Objectives</text:p>
        </text:list-item>
      </text:list>
      <text:p text:style-name="List_20_Bullet">Build a working web application.</text:p>
      <text:p text:style-name="List_20_Bullet">Create a Docker image using a Dockerfile.</text:p>
      <text:p text:style-name="List_20_Bullet">Run and test the container locally.</text:p>
      <text:p text:style-name="List_20_Bullet">Push the Docker image to Docker Hub.</text:p>
      <text:p text:style-name="List_20_Bullet">Create Kubernetes namespace, deployment, and service YAML files.</text:p>
      <text:p text:style-name="List_20_Bullet">Deploy the application to Kubernetes.</text:p>
      <text:p text:style-name="List_20_Bullet">Expose the application using NodePort service.</text:p>
      <text:p text:style-name="List_20_Bullet">Scale the deployment from 2 replicas to 4 replicas.</text:p>
      <text:p text:style-name="List_20_Bullet">Perform rolling update from version v1.0 to v2.0.</text:p>
      <text:p text:style-name="List_20_Bullet">Perform rollback to the previous version.</text:p>
      <text:p text:style-name="List_20_Bullet">Verify recovery and monitoring using kubectl commands.</text:p>
      <text:list xml:id="list43575987" text:continue-numbering="true" text:style-name="Outline">
        <text:list-item>
          <text:p text:style-name="Heading_20_1">4. Application Requirements</text:p>
        </text:list-item>
      </text:list>
      <text:p text:style-name="List_20_Bullet">Application Name: ShadowXLab Cyber Learning Portal</text:p>
      <text:p text:style-name="List_20_Bullet">Version: v1.0 initially, updated to v2.0 during rolling update</text:p>
      <text:p text:style-name="List_20_Bullet">Hostname: Displayed using container hostname</text:p>
      <text:p text:style-name="List_20_Bullet">Date/Time: Displayed dynamically</text:p>
      <text:p text:style-name="List_20_Bullet">Environment: production</text:p>
      <text:p text:style-name="List_20_Bullet">Health Check Endpoint: /health</text:p>
      <text:list xml:id="list43579458" text:continue-numbering="true" text:style-name="Outline">
        <text:list-item>
          <text:p text:style-name="Heading_20_1"><text:soft-page-break/>5. Project Folder Structure</text:p>
        </text:list-item>
      </text:list>
      <text:p text:style-name="P2"><draw:frame draw:style-name="fr1" draw:name="graphics1" text:anchor-type="paragraph" svg:x="0.693cm" svg:y="4.022cm" svg:width="9.525cm" svg:height="9.234cm" draw:z-index="0"><draw:image xlink:href="Pictures/10000000000001680000015D7465AB0C.png" xlink:type="simple" xlink:show="embed" xlink:actuate="onLoad"/></draw:frame><text:span text:style-name="T3">shadowxlab-capstone/<text:line-break/>├── app/<text:line-break/>│ <text:s text:c="2"/>├── app.py<text:line-break/>│ <text:s text:c="2"/>└── requirements.txt<text:line-break/>├── Dockerfile<text:line-break/>└── k8s/<text:line-break/> <text:s text:c="3"/>├── namespace.yaml<text:line-break/> <text:s text:c="3"/>├── deployment.yaml<text:line-break/> <text:s text:c="3"/>└── service.yaml</text:span></text:p>
      <text:list xml:id="list43560819" text:continue-numbering="true" text:style-name="Outline">
        <text:list-item>
          <text:p text:style-name="Heading_20_1">6. Phase 1: Application Development</text:p>
        </text:list-item>
      </text:list>
      <text:p text:style-name="Standard">The application is developed using Python Flask. It displays the application name, version, hostname, date/time, and environment details.</text:p>
      <text:list xml:id="list43570436" text:continue-numbering="true" text:style-name="Outline">
        <text:list-item>
          <text:list>
            <text:list-item>
              <text:h text:style-name="Heading_20_2" text:outline-level="2">app/app.py</text:h>
            </text:list-item>
          </text:list>
        </text:list-item>
      </text:list>
      <text:p text:style-name="P2"><text:span text:style-name="T3">from flask import Flask<text:line-break/>import socket<text:line-break/>import datetime<text:line-break/>import os<text:line-break/><text:line-break/>app = Flask(__name__)<text:line-break/><text:line-break/>APP_NAME = "ShadowXLab Cyber Learning Portal"<text:line-break/>APP_VERSION = os.getenv("APP_VERSION", "v1.0")<text:line-break/>APP_ENV = os.getenv("APP_ENV", "production")<text:line-break/><text:line-break/>@app.route("/")<text:line-break/>def home():<text:line-break/> <text:s text:c="3"/>hostname = socket.gethostname()<text:line-break/> <text:s text:c="3"/>current_time = datetime.datetime.now().strftime("%Y-%m-%d %H:%M:%S")<text:line-break/><text:line-break/> <text:s text:c="3"/>return f"""<text:line-break/> <text:s text:c="3"/>&lt;html&gt;<text:line-break/></text:span><text:soft-page-break/><text:span text:style-name="T3"> <text:s text:c="3"/>&lt;head&gt;<text:line-break/> <text:s text:c="7"/>&lt;title&gt;{APP_NAME}&lt;/title&gt;<text:line-break/> <text:s text:c="7"/>&lt;style&gt;<text:line-break/> <text:s text:c="11"/>body {{<text:line-break/> <text:s text:c="15"/>font-family: Arial;<text:line-break/> <text:s text:c="15"/>background-color: #0f172a;<text:line-break/> <text:s text:c="15"/>color: white;<text:line-break/> <text:s text:c="15"/>text-align: center;<text:line-break/> <text:s text:c="15"/>padding-top: 80px;<text:line-break/> <text:s text:c="11"/>}}<text:line-break/> <text:s text:c="11"/>.box {{<text:line-break/> <text:s text:c="15"/>background-color: #1e293b;<text:line-break/> <text:s text:c="15"/>padding: 30px;<text:line-break/> <text:s text:c="15"/>border-radius: 12px;<text:line-break/> <text:s text:c="15"/>width: 60%;<text:line-break/> <text:s text:c="15"/>margin: auto;<text:line-break/> <text:s text:c="11"/>}}<text:line-break/> <text:s text:c="7"/>&lt;/style&gt;<text:line-break/> <text:s text:c="3"/>&lt;/head&gt;<text:line-break/> <text:s text:c="3"/>&lt;body&gt;<text:line-break/> <text:s text:c="7"/>&lt;div class="box"&gt;<text:line-break/> <text:s text:c="11"/>&lt;h1&gt;{APP_NAME}&lt;/h1&gt;<text:line-break/> <text:s text:c="11"/>&lt;h2&gt;Version: {APP_VERSION}&lt;/h2&gt;<text:line-break/> <text:s text:c="11"/>&lt;p&gt;&lt;b&gt;Hostname:&lt;/b&gt; {hostname}&lt;/p&gt;<text:line-break/> <text:s text:c="11"/>&lt;p&gt;&lt;b&gt;Date/Time:&lt;/b&gt; {current_time}&lt;/p&gt;<text:line-break/> <text:s text:c="11"/>&lt;p&gt;&lt;b&gt;Environment:&lt;/b&gt; {APP_ENV}&lt;/p&gt;<text:line-break/> <text:s text:c="7"/>&lt;/div&gt;<text:line-break/> <text:s text:c="3"/>&lt;/body&gt;<text:line-break/> <text:s text:c="3"/>&lt;/html&gt;<text:line-break/> <text:s text:c="3"/>"""<text:line-break/><text:line-break/>@app.route("/health")<text:line-break/>def health():<text:line-break/> <text:s text:c="3"/>return "Application is healthy", 200<text:line-break/><text:line-break/>if __name__ == "__main__":<text:line-break/> <text:s text:c="3"/>app.run(host="0.0.0.0", port=5000)<text:line-break/></text:span></text:p>
      <text:list xml:id="list43582179" text:continue-numbering="true" text:style-name="Outline">
        <text:list-item>
          <text:list>
            <text:list-item>
              <text:h text:style-name="Heading_20_2" text:outline-level="2">app/requirements.txt</text:h>
            </text:list-item>
          </text:list>
        </text:list-item>
      </text:list>
      <text:p text:style-name="P2"><text:span text:style-name="T3">flask<text:line-break/></text:span></text:p>
      <text:list xml:id="list43572671" text:continue-numbering="true" text:style-name="Outline">
        <text:list-item>
          <text:p text:style-name="Heading_20_1">7. Phase 2: Docker Containerization</text:p>
        </text:list-item>
      </text:list>
      <text:p text:style-name="Standard">A Dockerfile is used to create a container image for the Flask application.</text:p>
      <text:list xml:id="list43556657" text:continue-numbering="true" text:style-name="Outline">
        <text:list-item>
          <text:list>
            <text:list-item>
              <text:h text:style-name="Heading_20_2" text:outline-level="2">Dockerfile</text:h>
            </text:list-item>
          </text:list>
        </text:list-item>
      </text:list>
      <text:p text:style-name="P2"><text:span text:style-name="T3">FROM python:3.11-slim<text:line-break/><text:line-break/>WORKDIR /app<text:line-break/><text:line-break/>COPY app/requirements.txt .<text:line-break/><text:line-break/>RUN pip install --no-cache-dir -r requirements.txt<text:line-break/><text:line-break/>COPY app/ .<text:line-break/><text:line-break/></text:span><text:soft-page-break/><text:span text:style-name="T3">EXPOSE 5000<text:line-break/><text:line-break/>CMD ["python", "app.py"]<text:line-break/></text:span></text:p>
      <text:list xml:id="list43558524" text:continue-numbering="true" text:style-name="Outline">
        <text:list-item>
          <text:list>
            <text:list-item>
              <text:h text:style-name="Heading_20_2" text:outline-level="2">Docker Build and Local Test Commands</text:h>
            </text:list-item>
          </text:list>
        </text:list-item>
      </text:list>
      <text:p text:style-name="P2"><draw:frame draw:style-name="fr1" draw:name="graphics2" text:anchor-type="paragraph" svg:x="0.079cm" svg:y="3.36cm" svg:width="17.526cm" svg:height="6.805cm" draw:z-index="1"><draw:image xlink:href="Pictures/10000000000004F3000001EC3C25318B.png" xlink:type="simple" xlink:show="embed" xlink:actuate="onLoad"/></draw:frame><text:span text:style-name="T3">docker build -t shadowxlab-portal:v1 .<text:line-break/>docker images<text:line-break/>docker run -d -p 5000:5000 --name shadowxlab shadowxlab-portal:v1<text:line-break/>curl http://localhost:5000<text:line-break/>curl http://localhost:5000/health<text:line-break/>docker stop shadowxlab<text:line-break/>docker rm shadowxlab<text:line-break/></text:span></text:p>
      <text:list xml:id="list43559081" text:continue-numbering="true" text:style-name="Outline">
        <text:list-item>
          <text:p text:style-name="Heading_20_1">8. Phase 3: Registry Operations</text:p>
        </text:list-item>
      </text:list>
      <text:p text:style-name="Standard">The Docker image is tagged and pushed to Docker Hub. Replace &lt;dockerhub-username&gt; with the actual Docker Hub username before running the commands.</text:p>
      <text:p text:style-name="P2"><text:span text:style-name="T3">docker login<text:line-break/>docker tag shadowxlab-portal:v1 amitesh7668/shadowxlab-portal:v1<text:line-break/>docker push amitesh7668/shadowxlab-portal:v1</text:span></text:p>
      <text:list xml:id="list43559236" text:continue-numbering="true" text:style-name="Outline">
        <text:list-item>
          <text:p text:style-name="Heading_20_1">9. Phase 4: Kubernetes Deployment</text:p>
        </text:list-item>
      </text:list>
      <text:p text:style-name="Standard">The application is deployed on Kubernetes using namespace and deployment YAML files.</text:p>
      <text:list xml:id="list43574445" text:continue-numbering="true" text:style-name="Outline">
        <text:list-item>
          <text:list>
            <text:list-item>
              <text:h text:style-name="Heading_20_2" text:outline-level="2">k8s/namespace.yaml</text:h>
            </text:list-item>
          </text:list>
        </text:list-item>
      </text:list>
      <text:p text:style-name="P2"><text:span text:style-name="T3">apiVersion: v1<text:line-break/>kind: Namespace<text:line-break/>metadata:<text:line-break/> <text:s/>name: shadowxlab<text:line-break/></text:span></text:p>
      <text:list xml:id="list43565940" text:continue-numbering="true" text:style-name="Outline">
        <text:list-item>
          <text:list>
            <text:list-item>
              <text:h text:style-name="Heading_20_2" text:outline-level="2">k8s/deployment.yaml</text:h>
            </text:list-item>
          </text:list>
        </text:list-item>
      </text:list>
      <text:p text:style-name="P2"><text:span text:style-name="T3">apiVersion: apps/v1<text:line-break/>kind: Deployment<text:line-break/>metadata:<text:line-break/> <text:s/>name: shadowxlab-deployment<text:line-break/></text:span><text:soft-page-break/><text:span text:style-name="T3"> <text:s/>namespace: shadowxlab<text:line-break/> <text:s/>labels:<text:line-break/> <text:s text:c="3"/>app: shadowxlab<text:line-break/>spec:<text:line-break/> <text:s/>replicas: 2<text:line-break/> <text:s/>selector:<text:line-break/> <text:s text:c="3"/>matchLabels:<text:line-break/> <text:s text:c="5"/>app: shadowxlab<text:line-break/> <text:s/>template:<text:line-break/> <text:s text:c="3"/>metadata:<text:line-break/> <text:s text:c="5"/>labels:<text:line-break/> <text:s text:c="7"/>app: shadowxlab<text:line-break/> <text:s text:c="3"/>spec:<text:line-break/> <text:s text:c="5"/>containers:<text:line-break/> <text:s text:c="7"/>- name: shadowxlab-container<text:line-break/> <text:s text:c="9"/>image: &lt;dockerhub-username&gt;/shadowxlab-portal:v1<text:line-break/> <text:s text:c="9"/>ports:<text:line-break/> <text:s text:c="11"/>- containerPort: 5000<text:line-break/> <text:s text:c="9"/>env:<text:line-break/> <text:s text:c="11"/>- name: APP_VERSION<text:line-break/> <text:s text:c="13"/>value: "v1.0"<text:line-break/> <text:s text:c="11"/>- name: APP_ENV<text:line-break/> <text:s text:c="13"/>value: "production"<text:line-break/></text:span></text:p>
      <text:list xml:id="list43571724" text:continue-numbering="true" text:style-name="Outline">
        <text:list-item>
          <text:list>
            <text:list-item>
              <text:h text:style-name="Heading_20_2" text:outline-level="2">Deployment Commands</text:h>
            </text:list-item>
          </text:list>
        </text:list-item>
      </text:list>
      <text:p text:style-name="P2"><draw:frame draw:style-name="fr1" draw:name="graphics3" text:anchor-type="paragraph" svg:x="0.178cm" svg:y="2.434cm" svg:width="16.484cm" svg:height="3.413cm" draw:z-index="2"><draw:image xlink:href="Pictures/100000000000026F000000812DC2150D.png" xlink:type="simple" xlink:show="embed" xlink:actuate="onLoad"/></draw:frame><text:span text:style-name="T3">kubectl apply -f k8s/namespace.yaml<text:line-break/>kubectl apply -f k8s/deployment.yaml<text:line-break/>kubectl get pods -n shadowxlab<text:line-break/>kubectl get deployment -n shadowxlab<text:line-break/></text:span></text:p>
      <text:list xml:id="list43551661" text:continue-numbering="true" text:style-name="Outline">
        <text:list-item>
          <text:p text:style-name="Heading_20_1">10. Phase 5: Service Exposure</text:p>
        </text:list-item>
      </text:list>
      <text:p text:style-name="Standard">The application is exposed using a Kubernetes NodePort service.</text:p>
      <text:list xml:id="list43559945" text:continue-numbering="true" text:style-name="Outline">
        <text:list-item>
          <text:list>
            <text:list-item>
              <text:h text:style-name="Heading_20_2" text:outline-level="2">k8s/service.yaml</text:h>
            </text:list-item>
          </text:list>
        </text:list-item>
      </text:list>
      <text:p text:style-name="P2"><text:span text:style-name="T3">apiVersion: v1<text:line-break/>kind: Service<text:line-break/>metadata:<text:line-break/> <text:s/>name: shadowxlab-service<text:line-break/> <text:s/>namespace: shadowxlab<text:line-break/>spec:<text:line-break/> <text:s/>type: NodePort<text:line-break/> <text:s/>selector:<text:line-break/> <text:s text:c="3"/>app: shadowxlab<text:line-break/> <text:s/>ports:<text:line-break/> <text:s text:c="3"/>- port: 80<text:line-break/> <text:s text:c="5"/>targetPort: 5000<text:line-break/></text:span><text:soft-page-break/><text:span text:style-name="T3"> <text:s text:c="5"/>nodePort: 30080<text:line-break/></text:span></text:p>
      <text:list xml:id="list43559663" text:continue-numbering="true" text:style-name="Outline">
        <text:list-item>
          <text:list>
            <text:list-item>
              <text:h text:style-name="Heading_20_2" text:outline-level="2">Service Commands</text:h>
            </text:list-item>
          </text:list>
        </text:list-item>
      </text:list>
      <text:p text:style-name="P2"><text:span text:style-name="T3">kubectl apply -f k8s/service.yaml<text:line-break/>kubectl get svc -n shadowxlab<text:line-break/>kubectl get all -n shadowxlab</text:span></text:p>
      <text:p text:style-name="Standard">Access URL format: http://<text:a xlink:type="simple" xlink:href="http://localhost:30080/" text:style-name="Internet_20_link" text:visited-style-name="Visited_20_Internet_20_Link">ShadowXLab Cyber Learning Portal</text:a> </text:p>
      <text:p text:style-name="Standard"><text:span text:style-name="T3"/></text:p>
      <text:list xml:id="list43568955" text:continue-numbering="true" text:style-name="Outline">
        <text:list-item>
          <text:p text:style-name="Heading_20_1">11. Phase 6: Scaling</text:p>
        </text:list-item>
      </text:list>
      <text:p text:style-name="Standard">The deployment is scaled from 2 replicas to 4 replicas to demonstrate application scalability.</text:p>
      <text:p text:style-name="P2"><text:span text:style-name="T3">kubectl scale deployment shadowxlab-deployment --replicas=4 -n shadowxlab<text:line-break/>kubectl get pods -n shadowxlab<text:line-break/>kubectl get deployment -n shadowxlab</text:span></text:p>
      <text:p text:style-name="Standard"><draw:frame draw:style-name="fr1" draw:name="graphics4" text:anchor-type="paragraph" svg:x="0.178cm" svg:y="0.767cm" svg:width="16.484cm" svg:height="3.413cm" draw:z-index="3"><draw:image xlink:href="Pictures/100000000000026F000000812DC2150D.png" xlink:type="simple" xlink:show="embed" xlink:actuate="onLoad"/></draw:frame>Evidence to capture: screenshot of kubectl get pods -n shadowxlab showing 4 running pods</text:p>
      <text:list xml:id="list43580561" text:continue-numbering="true" text:style-name="Outline">
        <text:list-item>
          <text:p text:style-name="Heading_20_1">12. Phase 7: Rolling Update</text:p>
        </text:list-item>
      </text:list>
      <text:p text:style-name="Standard">The application is updated from version v1.0 to v2.0. Update app.py or environment value, build a new Docker image, push it, and update the Kubernetes deployment image.</text:p>
      <text:p text:style-name="P2"><text:span text:style-name="T3"># Change APP_VERSION default or deployment env value from v1.0 to v2.0<text:line-break/><text:line-break/>docker build -t shadowxlab-portal:v2 .<text:line-break/>docker tag shadowxlab-portal:v2 &lt;dockerhub-username&gt;/shadowxlab-portal:v2<text:line-break/>docker push &lt;dockerhub-username&gt;/shadowxlab-portal:v2<text:line-break/><text:line-break/>kubectl set image deployment/shadowxlab-deployment shadowxlab-container=&lt;dockerhub-username&gt;/shadowxlab-portal:v2 -n shadowxlab<text:line-break/>kubectl rollout status deployment/shadowxlab-deployment -n shadowxlab<text:line-break/>kubectl rollout history deployment/shadowxlab-deployment -n shadowxlab<text:line-break/>kubectl get pods -n shadowxlab</text:span></text:p>
      <text:p text:style-name="Standard"><draw:frame draw:style-name="fr1" draw:name="graphics5" text:anchor-type="paragraph" svg:x="0.293cm" svg:y="5.667cm" svg:width="13.183cm" svg:height="7.551cm" draw:z-index="4"><draw:image xlink:href="Pictures/1000000000000319000001C36C7FB6E6.png" xlink:type="simple" xlink:show="embed" xlink:actuate="onLoad"/></draw:frame><draw:frame draw:style-name="fr1" draw:name="graphics6" text:anchor-type="paragraph" svg:x="0.159cm" svg:y="14.346cm" svg:width="14.083cm" svg:height="8.936cm" draw:z-index="5"><draw:image xlink:href="Pictures/10000000000003240000019A37EDED88.png" xlink:type="simple" xlink:show="embed" xlink:actuate="onLoad"/></draw:frame><text:line-break/><text:line-break/><text:line-break/><text:line-break/><text:line-break/><text:line-break/><text:line-break/><text:line-break/><text:line-break/><text:line-break/><text:soft-page-break/>Evidence to capture: screenshot of rollout status and rollout history.<text:line-break/>Version : V2.0<text:line-break/>Version : V2.0<text:line-break/><text:line-break/><text:line-break/><text:line-break/><text:line-break/><text:line-break/><text:line-break/><text:line-break/><text:line-break/></text:p>
      <text:list xml:id="list43576927" text:continue-numbering="true" text:style-name="Outline">
        <text:list-item>
          <text:p text:style-name="Heading_20_1"><text:soft-page-break/>13. Phase 8: Rollback</text:p>
        </text:list-item>
      </text:list>
      <text:p text:style-name="Standard">Rollback is performed to restore the previous working version of the application.</text:p>
      <text:p text:style-name="P2"><text:span text:style-name="T3">kubectl rollout undo deployment/shadowxlab-deployment -n shadowxlab<text:line-break/>kubectl rollout status deployment/shadowxlab-deployment -n shadowxlab<text:line-break/>kubectl rollout history deployment/shadowxlab-deployment -n shadowxlab<text:line-break/>kubectl get pods -n shadowxlab</text:span></text:p>
      <text:p text:style-name="Standard"><draw:frame draw:style-name="fr1" draw:name="graphics7" text:anchor-type="paragraph" svg:x="0.053cm" svg:y="0.767cm" svg:width="17.526cm" svg:height="2.096cm" draw:z-index="6"><draw:image xlink:href="Pictures/100000000000031A0000005FDF3866E8.png" xlink:type="simple" xlink:show="embed" xlink:actuate="onLoad"/></draw:frame>Evidence to capture: screenshot showing successful rollback status.<text:line-break/></text:p>
      <text:list xml:id="list43553372" text:continue-numbering="true" text:style-name="Outline">
        <text:list-item>
          <text:p text:style-name="Heading_20_1">14. Phase 9: Failure Recovery</text:p>
        </text:list-item>
      </text:list>
      <text:p text:style-name="Standard">Kubernetes automatically recreates pods when one pod is deleted. This proves self-healing and recovery.</text:p>
      <text:p text:style-name="P2"><text:span text:style-name="T3">kubectl get pods -n shadowxlab<text:line-break/>kubectl delete pod &lt;pod-name&gt; -n shadowxlab<text:line-break/>kubectl get pods -n shadowxlab<text:line-break/>kubectl describe deployment shadowxlab-deployment -n shadowxlab</text:span></text:p>
      <text:list xml:id="list43566689" text:continue-numbering="true" text:style-name="Outline">
        <text:list-item>
          <text:p text:style-name="Heading_20_1">15. Phase 10: Monitoring</text:p>
        </text:list-item>
      </text:list>
      <text:p text:style-name="Standard">Basic monitoring is performed using kubectl commands to check resources, pod details, and application logs.</text:p>
      <text:p text:style-name="P2"><text:span text:style-name="T3">kubectl get all -n shadowxlab<text:line-break/>kubectl describe pods -n shadowxlab<text:line-break/>kubectl logs &lt;pod-name&gt; -n shadowxlab<text:line-break/>kubectl get events -n shadowxlab</text:span></text:p>
      <text:list xml:id="list43574935" text:continue-numbering="true" text:style-name="Outline">
        <text:list-item>
          <text:p text:style-name="Heading_20_1">16. Evidence Checklist</text:p>
        </text:list-item>
      </text:list>
      <text:p text:style-name="List_20_Bullet">docker images</text:p>
      <text:p text:style-name="List_20_Bullet">docker run / docker ps output</text:p>
      <text:p text:style-name="List_20_Bullet">docker push output</text:p>
      <text:p text:style-name="List_20_Bullet">kubectl get pods -n shadowxlab</text:p>
      <text:p text:style-name="List_20_Bullet">kubectl get svc -n shadowxlab</text:p>
      <text:p text:style-name="List_20_Bullet">kubectl get deployment -n shadowxlab</text:p>
      <text:p text:style-name="List_20_Bullet">kubectl get all -n shadowxlab</text:p>
      <text:p text:style-name="List_20_Bullet">kubectl rollout status deployment/shadowxlab-deployment -n shadowxlab</text:p>
      <text:p text:style-name="List_20_Bullet">kubectl rollout history deployment/shadowxlab-deployment -n shadowxlab</text:p>
      <text:p text:style-name="List_20_Bullet">kubectl rollout undo deployment/shadowxlab-deployment -n shadowxlab</text:p>
      <text:p text:style-name="List_20_Bullet"><text:soft-page-break/>kubectl logs &lt;pod-name&gt; -n shadowxlab</text:p>
      <text:list xml:id="list43564185" text:continue-numbering="true" text:style-name="Outline">
        <text:list-item>
          <text:p text:style-name="Heading_20_1">17. Final Project Summary</text:p>
        </text:list-item>
      </text:list>
      <text:p text:style-name="Standard">The ShadowXLab Cyber Learning Portal was successfully developed, containerized, pushed to Docker Hub, deployed on Kubernetes, exposed using a NodePort service, scaled to multiple replicas, updated using rolling update, rolled back to a previous version, recovered after pod failure, and monitored using kubectl commands.</text:p>
      <text:list xml:id="list43553882" text:continue-numbering="true" text:style-name="Outline">
        <text:list-item>
          <text:p text:style-name="Heading_20_1">18. Conclusion</text:p>
        </text:list-item>
      </text:list>
      <text:p text:style-name="Standard">This project satisfies the mandatory capstone requirements for Docker and Kubernetes. It demonstrates practical knowledge of building Docker images, running containers, publishing images to a registry, deploying applications on Kubernetes, exposing services, scaling workloads, performing rolling updates, executing rollbacks, validating recovery, and monitoring Kubernetes resources.</text:p>
      <text:list xml:id="list43566779" text:continue-numbering="true" text:style-name="Outline">
        <text:list-item>
          <text:p text:style-name="Heading_20_1">19. Final Execution Order</text:p>
        </text:list-item>
      </text:list>
      <text:p text:style-name="P2"><text:span text:style-name="T3">mkdir shadowxlab-capstone<text:line-break/>cd shadowxlab-capstone<text:line-break/>mkdir app k8s<text:line-break/><text:line-break/># Create app/app.py, app/requirements.txt, Dockerfile, and k8s YAML files<text:line-break/><text:line-break/>docker build -t shadowxlab-portal:v1 .<text:line-break/>docker run -d -p 5000:5000 --name shadowxlab shadowxlab-portal:v1<text:line-break/>curl http://localhost:5000<text:line-break/><text:line-break/>docker login<text:line-break/>docker tag shadowxlab-portal:v1 &lt;dockerhub-username&gt;/shadowxlab-portal:v1<text:line-break/>docker push &lt;dockerhub-username&gt;/shadowxlab-portal:v1<text:line-break/><text:line-break/>kubectl apply -f k8s/namespace.yaml<text:line-break/>kubectl apply -f k8s/deployment.yaml<text:line-break/>kubectl apply -f k8s/service.yaml<text:line-break/>kubectl get all -n shadowxlab<text:line-break/><text:line-break/>kubectl scale deployment shadowxlab-deployment --replicas=4 -n shadowxlab<text:line-break/>kubectl get pods -n shadowxlab<text:line-break/><text:line-break/># Build and push v2 image, then update deployment<text:line-break/>docker build -t shadowxlab-portal:v2 .<text:line-break/>docker tag shadowxlab-portal:v2 &lt;dockerhub-username&gt;/shadowxlab-portal:v2<text:line-break/>docker push &lt;dockerhub-username&gt;/shadowxlab-portal:v2<text:line-break/>kubectl set image deployment/shadowxlab-deployment shadowxlab-container=&lt;dockerhub-username&gt;/shadowxlab-portal:v2 -n shadowxlab<text:line-break/>kubectl rollout status deployment/shadowxlab-deployment -n shadowxlab<text:line-break/><text:line-break/>kubectl rollout undo deployment/shadowxlab-deployment -n shadowxlab<text:line-break/>kubectl rollout status deployment/shadowxlab-deployment -n shadowxl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Arial1"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Arial1"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2.032cm" fo:margin-right="2.03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6-06-08T23:29:06.53</dc:date>
    <meta:editing-duration>P0D</meta:editing-duration>
    <meta:generator>OpenOffice/4.1.15$Win32 OpenOffice.org_project/4115m2$Build-9813</meta:generator>
    <meta:document-statistic meta:table-count="0" meta:image-count="7" meta:object-count="0" meta:page-count="9" meta:paragraph-count="93" meta:word-count="1198" meta:character-count="102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